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T1" style:family="text">
      <style:text-properties officeooo:rsid="0004fb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study presents a<text:span text:style-name="T1">n</text:span> integration of digital elevation model (DEM)-derived terrain attributes with machine learning techniques, specifically Random Forest regression, to understand and predict the spatial variability of sediment fingerprinting properties at the field scale. By systematically analyzing the relationship between 15 soil geochemical and color properties and key terrain attributes such as elevation, wetness, and relative slope position, the research provides a process-informed basis for sediment source characterization. This allows for the development of more efficient and effective stratified sampling designs, reducing costs by minimizing redundant sampling while ensuring key geomorphic features are adequately represented. The international significance of this work lies in its potential to standardize and improve the sediment fingerprinting method, a critical tool for watershed management. By providing a transferable framework for using widely available <text:span text:style-name="T1">DEM</text:span> data to guide sampling and map fingerprint properties, this research addresses a global need for more accurate, low-cost, and process-based approaches to trace sediment sources and inform erosion control strateg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12:52:59.589862656</meta:creation-date>
    <dc:date>2026-05-13T14:56:31.127236198</dc:date>
    <meta:editing-duration>PT1H53M20S</meta:editing-duration>
    <meta:editing-cycles>1</meta:editing-cycles>
    <meta:document-statistic meta:table-count="0" meta:image-count="0" meta:object-count="0" meta:page-count="1" meta:paragraph-count="1" meta:word-count="160" meta:character-count="1202" meta:non-whitespace-character-count="1043"/>
    <meta:generator>LibreOffice/24.2.7.2$Linux_X86_64 LibreOffice_project/420$Build-2</meta:generator>
  </office:meta>
</office:document-meta>
</file>